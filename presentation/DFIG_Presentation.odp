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1F80000083B4EB3189C.png" manifest:media-type="image/png"/>
  <manifest:file-entry manifest:full-path="Pictures/1000000000000500000002D062454F77.png" manifest:media-type="image/png"/>
  <manifest:file-entry manifest:full-path="Pictures/10000000000004FF0000035937DA97E2.jpg" manifest:media-type="image/jpeg"/>
  <manifest:file-entry manifest:full-path="Pictures/100000010000078C000003C35DD1196E.png" manifest:media-type="image/png"/>
  <manifest:file-entry manifest:full-path="Pictures/1000000000000280000001AA8C8631F1.jpg" manifest:media-type="image/jpeg"/>
  <manifest:file-entry manifest:full-path="Pictures/1000000000000708000003F571433686.jpg" manifest:media-type="image/jpeg"/>
  <manifest:file-entry manifest:full-path="Pictures/100000000000084100000580EE3D443A.jpg" manifest:media-type="image/jpeg"/>
  <manifest:file-entry manifest:full-path="Pictures/10000000000002BC000001D03B28EA29.jpg" manifest:media-type="image/jpe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c2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opacity="50%" draw:opacity-name="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27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9688" svg:stroke-linecap="butt" draw:fill="solid" draw:fill-color="#00968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5cm, 0cm, 2.285cm, 0cm)" draw:image-opacity="100%" style:mirror="non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5.48cm" fo:min-width="29.995cm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fill="solid" draw:fill-color="#333333" draw:opacity="81%" draw:textarea-horizontal-align="justify" draw:textarea-vertical-align="middle" draw:auto-grow-height="false" fo:min-height="7.199cm" fo:min-width="29.809cm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fill="solid" draw:fill-color="#333333" draw:opacity="85%" draw:textarea-horizontal-align="justify" draw:textarea-vertical-align="middle" draw:auto-grow-height="false" fo:min-height="7.199cm" fo:min-width="29.809cm" loext:decorative="false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8.918cm" fo:min-width="29.623cm" loext:decorative="false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7.772cm" fo:min-width="29.747cm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7.772cm" fo:min-width="29.747cm" loext:decorative="false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5.48cm" fo:min-width="29.995cm" loext:decorative="false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35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1.41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968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333333" draw:opacity="40%"/>
      <style:paragraph-properties fo:text-align="center"/>
    </style:style>
    <style:style style:name="P12" style:family="paragraph">
      <loext:graphic-properties draw:fill="solid" draw:fill-color="#333333" draw:opacity="81%"/>
      <style:paragraph-properties fo:text-align="center"/>
    </style:style>
    <style:style style:name="P13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ffffff" loext:opacity="100%" fo:font-size="18pt" fo:hyphenate="false"/>
    </style:style>
    <style:style style:name="P14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8pt" fo:hyphenate="false"/>
    </style:style>
    <style:style style:name="P15" style:family="paragraph">
      <loext:graphic-properties draw:fill="solid" draw:fill-color="#333333" draw:opacity="85%"/>
      <style:paragraph-properties fo:text-align="center"/>
    </style:style>
    <style:style style:name="P16" style:family="paragraph">
      <loext:graphic-properties draw:fill="solid" draw:fill-color="#333333" draw:opacity="70%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9688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b4b4b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121e31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968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b4b4b4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121e3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23232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style-name="gr1" draw:text-style-name="P1" draw:layer="layout" svg:width="33.865cm" svg:height="16.879cm" svg:x="0cm" svg:y="0.901cm">
          <draw:image xlink:href="Pictures/100000010000078C000003C35DD1196E.png" xlink:type="simple" xlink:show="embed" xlink:actuate="onLoad" draw:mime-type="image/png">
            <text:p/>
          </draw:image>
        </draw:frame>
        <draw:custom-shape draw:name="TextBox 1" draw:style-name="gr2" draw:text-style-name="P5" draw:layer="layout" svg:width="28.785cm" svg:height="7.009cm" svg:x="2.54cm" svg:y="5.08cm">
          <text:p text:style-name="P2"><text:span text:style-name="T1">Dvostrano napajani asinhroni generator (DFIG)</text:span></text:p>
          <text:p text:style-name="P3"><text:span text:style-name="T2">Dinamičko DAE modeliranje, analiza i plugin pretvarač za dTwin</text:span></text:p>
          <text:p text:style-name="P4"><text:span text:style-name="T3">Projektna grupa SREES <text:s/>| <text:s/>Prezentacija projekta (5-6 minu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4" draw:text-style-name="P5" draw:layer="layout" svg:width="29.209cm" svg:height="1.606cm" svg:x="2.032cm" svg:y="0cm">
          <text:p text:style-name="P2"><text:span text:style-name="T4">Šta je to DFIG vjetroturbina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2.0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7.677cm" svg:height="10.777cm" svg:x="3.175cm" svg:y="8.273cm">
          <draw:image xlink:href="Pictures/1000000000000500000002D062454F77.png" xlink:type="simple" xlink:show="embed" xlink:actuate="onLoad" draw:mime-type="image/png">
            <text:p/>
          </draw:image>
        </draw:frame>
        <draw:custom-shape draw:name="TextBox 3" draw:style-name="gr7" draw:text-style-name="P10" draw:layer="layout" svg:width="29.801cm" svg:height="6.092cm" svg:x="2.032cm" svg:y="2.667cm">
          <text:p text:style-name="P9"><text:span text:style-name="T5">• <text:s/>Stator direktno spojen na mrežu: Radi na konstantnoj frekvenciji trofazne mreže.</text:span></text:p>
          <text:p text:style-name="P9"><text:span text:style-name="T5">• <text:s/>Rotor spojen preko back-to-back pretvarača: Sastoji se od RSC (rotor) i GSC (mreža) pretvarača.</text:span></text:p>
          <text:p text:style-name="P9"><text:span text:style-name="T5">• <text:s/>Kontrola snage klizanja: Pretvarač dimenzionisan samo za snagu klizanja (25-30% nominalne snage), što znatno smanjuje ukupne troškove opreme.</text:span></text:p>
          <text:p text:style-name="P9"><text:span text:style-name="T5">• <text:s/>Razdvojena (dekuplovana) regulacija snage: Vektorskom kontrolom se nezavisno upravlja aktivnom (P_h) i reaktivnom (Q_h) snagom stator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31.115cm" svg:height="6.3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9" draw:text-style-name="P5" draw:layer="layout" svg:width="29.209cm" svg:height="1.606cm" svg:x="2.032cm" svg:y="1.27cm">
          <text:p text:style-name="P2"><text:span text:style-name="T4">Matematički model: Milanov dq-DAE mod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11" draw:text-style-name="P14" draw:layer="layout" svg:width="29.801cm" svg:height="7.7cm" svg:x="2.032cm" svg:y="4.572cm">
          <text:p text:style-name="P13"><text:span text:style-name="T6">• <text:s/>Tri dinamičke varijable stanja (ODE):</text:span></text:p>
          <text:p text:style-name="P13"><text:span text:style-name="T6"><text:s text:c="4"/>- <text:s/>Brzina rotora (w_m): Dinamika ravnoteže mehaničkog i elektromagnetnog momenta.</text:span></text:p>
          <text:p text:style-name="P13"><text:span text:style-name="T6"><text:s text:c="4"/>- <text:s/>Rotorske struje (i_rq, i_rd): Vremenska kašnjenja prvog reda koja modeliraju RSC kontroler.</text:span></text:p>
          <text:p text:style-name="P13"><text:span text:style-name="T6">• <text:s/>Elektromagnetni moment (T_e): Algebarski povezuje rotorsku struju i_rq i napon sabirnice v_h.</text:span></text:p>
          <text:p text:style-name="P13"><text:span text:style-name="T6">• <text:s/>Ubrizgavanje snage u mrežu: Računanje aktivne snage P_h i reaktivne snage Q_h na sabirnici generatora.</text:span></text:p>
          <text:p text:style-name="P13"><text:span text:style-name="T6">• <text:s/>Kompatibilnost sa rješavačem: Jednačine unesene direktno u ODE blokove radi stabilnijeg rad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1" draw:style-name="gr12" draw:text-style-name="P5" draw:layer="layout" svg:width="29.209cm" svg:height="1.606cm" svg:x="2.032cm" svg:y="1.27cm">
          <text:p text:style-name="P2"><text:span text:style-name="T4">Arhitektura programa i ModelConver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14" draw:text-style-name="P14" draw:layer="layout" svg:width="29.801cm" svg:height="8.039cm" svg:x="2.032cm" svg:y="4.572cm">
          <text:p text:style-name="P13"><text:span text:style-name="T6">• <text:s/>Faze 1-3: Parsiranje XML-a i izgradnja matrica (rijetka Y-bus matrica admitansi, guste matrice napona i parametara).</text:span></text:p>
          <text:p text:style-name="P13"><text:span text:style-name="T6">• <text:s/>Faze 4-5: Zapisivanje konfiguracionog zaglavlja DMODL-a i deklaracija početnih stanja varijabli.</text:span></text:p>
          <text:p text:style-name="P13"><text:span text:style-name="T6">• <text:s/>Faza 6: Sekcija parametara s konstantama i registracija algebarskih izlaza kao [out=true].</text:span></text:p>
          <text:p text:style-name="P13"><text:span text:style-name="T6">• <text:s/>Faze 7-10: Generisanje ODE jednačina, postprocesiranja i kreiranje izlaznih datoteka (.dmodl i .vmodl).</text:span></text:p>
          <text:p text:style-name="P13"><text:span text:style-name="T6">• <text:s/>Memorijska stabilnost: Pisanje putem lokalnih bafera sprečava curenje memorije i rušenje dTwin-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1" draw:style-name="gr15" draw:text-style-name="P5" draw:layer="layout" svg:width="29.209cm" svg:height="1.606cm" svg:x="2.032cm" svg:y="1.27cm">
          <text:p text:style-name="P2"><text:span text:style-name="T4">Simulacija i analiza: IEEE 9-sabirnički si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6" draw:layer="layout" svg:width="31.115cm" svg:height="10.16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17" draw:text-style-name="P14" draw:layer="layout" svg:width="29.801cm" svg:height="9.563cm" svg:x="2.032cm" svg:y="4.572cm">
          <text:p text:style-name="P13"><text:span text:style-name="T6">• <text:s/>Aktivna snaga (P_h): Brzo se stabilizuje na vrijednosti od oko 1.63 p.u. (163 MW na bazi 100 MVA).</text:span></text:p>
          <text:p text:style-name="P13"><text:span text:style-name="T6">• <text:s/>Reaktivna snaga (Q_h): Reguliše se na stabilnih -0.12 p.u. radi pružanja naponske podrške sabirnici.</text:span></text:p>
          <text:p text:style-name="P13"><text:span text:style-name="T6">• <text:s/>Dinamika rotora: Brzina rotora (w_m) glatko ubrzava sa 1.0 p.u. i ustaljuje se na optimalnih 1.2 p.u.</text:span></text:p>
          <text:p text:style-name="P13"><text:span text:style-name="T6">• <text:s/>Upravljanje strujama: Rotorske struje (i_rq i i_rd) stabilno prate reference pretvarača na strani rotora.</text:span></text:p>
          <text:p text:style-name="P13"><text:span text:style-name="T6">• <text:s/>Stabilnost sinhronih mašina: Oscilacije uglova i brzina preostala dva generatora prigušuju se za manje od 4 sekun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1" draw:style-name="gr18" draw:text-style-name="P5" draw:layer="layout" svg:width="29.209cm" svg:height="1.606cm" svg:x="2.032cm" svg:y="1.27cm">
          <text:p text:style-name="P2"><text:span text:style-name="T4">Simulacija i analiza: IEEE 118-sabirnički si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1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20" draw:text-style-name="P14" draw:layer="layout" svg:width="29.801cm" svg:height="8.039cm" svg:x="2.032cm" svg:y="4.572cm">
          <text:p text:style-name="P13"><text:span text:style-name="T6">• <text:s/>Skalabilnost u velikoj mreži: Uspješno simuliran rad DFIG-a u sistemu sa ukupno 54 generatora.</text:span></text:p>
          <text:p text:style-name="P13"><text:span text:style-name="T6">• <text:s/>Stabilnost DFIG-a: Lokalne regulacijske petlje vjetroturbine rade stabilno bez uticaja drugih mašina.</text:span></text:p>
          <text:p text:style-name="P13"><text:span text:style-name="T6">• <text:s/>Sinhronizam generatora: Preostala 53 sinhrona generatora ostaju u stabilnom radu nakon uključenja DFIG-a.</text:span></text:p>
          <text:p text:style-name="P13"><text:span text:style-name="T6">• <text:s/>Damping oscilacija: Brzine rotora sinhronih mašina se brzo prigušuju, potvrđujući da DFIG ne unosi nestabilnost.</text:span></text:p>
          <text:p text:style-name="P13"><text:span text:style-name="T6">• <text:s/>Robusnost: Dokazan stabilan rad algoritma u velikim prenosnim mrežam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>
        <draw:frame draw:style-name="gr21" draw:text-style-name="P8" draw:layer="layout" svg:width="33.865cm" svg:height="15.51cm" svg:x="0.001cm" svg:y="1cm">
          <draw:image xlink:href="Pictures/10000001000011F80000083B4EB3189C.png" xlink:type="simple" xlink:show="embed" xlink:actuate="onLoad" draw:mime-type="image/png">
            <text:p/>
          </draw:image>
        </draw:frame>
        <draw:custom-shape draw:name="TextBox 1" draw:style-name="gr22" draw:text-style-name="P5" draw:layer="layout" svg:width="29.209cm" svg:height="1.606cm" svg:x="2.032cm" svg:y="1.27cm">
          <text:p text:style-name="P2"><text:span text:style-name="T4">Kompajliranje i instalaci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6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24" draw:text-style-name="P14" draw:layer="layout" svg:width="29.801cm" svg:height="7.7cm" svg:x="2.032cm" svg:y="4.572cm">
          <text:p text:style-name="P13"><text:span text:style-name="T6">• <text:s/>Linux (GCC / Makefile):</text:span></text:p>
          <text:p text:style-name="P13"><text:span text:style-name="T6"><text:s text:c="4"/>- <text:s/>cmake -DCMAKE_BUILD_TYPE=Release .. &amp;&amp; cmake --build . -j$(nproc)</text:span></text:p>
          <text:p text:style-name="P13"><text:span text:style-name="T6">• <text:s/>Windows (Visual Studio / MSBuild):</text:span></text:p>
          <text:p text:style-name="P13"><text:span text:style-name="T6"><text:s text:c="4"/>- <text:s/>cmake .. &amp;&amp; cmake --build . --config Release</text:span></text:p>
          <text:p text:style-name="P13"><text:span text:style-name="T6">• <text:s/>Instalacija: Kopiranje dll/so biblioteke u 'plugins' direktorijum dTwin aplikacije.</text:span></text:p>
          <text:p text:style-name="P13"><text:span text:style-name="T6">• <text:s/>Verifikacija: test_runner vrši automatsku konverziju i testiranje rješavača na 9, 30, 118 i 300 sabirnic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Blank">
        <draw:custom-shape draw:name="TextBox 1" draw:style-name="gr25" draw:text-style-name="P5" draw:layer="layout" svg:width="29.209cm" svg:height="1.606cm" svg:x="2.032cm" svg:y="1.27cm">
          <text:p text:style-name="P2"><text:span text:style-name="T4">Zaključ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6" draw:layer="layout" svg:width="31.115cm" svg:height="6.3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27" draw:text-style-name="P14" draw:layer="layout" svg:width="29.801cm" svg:height="4.568cm" svg:x="2.032cm" svg:y="4.572cm">
          <text:p text:style-name="P13"><text:span text:style-name="T6">• <text:s/>Uspješna integracija: Milanov DFIG model u potpunosti integrisan u dTwin platformu.</text:span></text:p>
          <text:p text:style-name="P13"><text:span text:style-name="T6">• <text:s/>Stabilan rad: Plugin radi bez rušenja na Windows i Linux operativnim sistemima.</text:span></text:p>
          <text:p text:style-name="P13"><text:span text:style-name="T6">• <text:s/>Skalabilnost: Testirano i potvrđeno na mrežama do 300 sabirnica (IEEE 300).</text:span></text:p>
          <text:p text:style-name="P13"><text:span text:style-name="T6">• <text:s/>Visoka numerička stabilnost: Riješeni svi padovi memorije i debalansi jednačina u rješavač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fill-image draw:name="Bitmap_20_2" draw:display-name="Bitmap 2" xlink:href="Pictures/10000000000002BC000001D03B28EA29.jpg" xlink:type="simple" xlink:show="embed" xlink:actuate="onLoad"/>
    <draw:fill-image draw:name="Bitmap_20_3" draw:display-name="Bitmap 3" xlink:href="Pictures/100000000000084100000580EE3D443A.jpg" xlink:type="simple" xlink:show="embed" xlink:actuate="onLoad"/>
    <draw:fill-image draw:name="Bitmap_20_4" draw:display-name="Bitmap 4" xlink:href="Pictures/1000000000000708000003F571433686.jpg" xlink:type="simple" xlink:show="embed" xlink:actuate="onLoad"/>
    <draw:fill-image draw:name="Bitmap_20_5" draw:display-name="Bitmap 5" xlink:href="Pictures/1000000000000280000001AA8C8631F1.jpg" xlink:type="simple" xlink:show="embed" xlink:actuate="onLoad"/>
    <draw:fill-image draw:name="background" xlink:href="Pictures/10000000000004FF0000035937DA97E2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Only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3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7-06T21:00:30.692133254</dc:date>
    <meta:editing-duration>PT23M40S</meta:editing-duration>
    <meta:generator>LibreOffice/26.2.4.2$Linux_X86_64 LibreOffice_project/df4f15f06f7b375c1d16aa35fba92d50b262cd01</meta:generator>
    <meta:document-statistic meta:object-count="186"/>
    <meta:user-defined meta:name="AppVersion">14.0000</meta:user-defined>
    <meta:user-defined meta:name="PresentationFormat">On-screen Show (4:3)</meta:user-defined>
  </office:meta>
</office:document-meta>
</file>