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1F80000083B4EB3189C.png" manifest:media-type="image/png"/>
  <manifest:file-entry manifest:full-path="Pictures/1000000000000500000002D062454F77.png" manifest:media-type="image/png"/>
  <manifest:file-entry manifest:full-path="Pictures/10000000000004FF0000035937DA97E2.jpg" manifest:media-type="image/jpeg"/>
  <manifest:file-entry manifest:full-path="Pictures/100000010000078C000003C35DD1196E.png" manifest:media-type="image/png"/>
  <manifest:file-entry manifest:full-path="Pictures/1000000000000280000001AA8C8631F1.jpg" manifest:media-type="image/jpeg"/>
  <manifest:file-entry manifest:full-path="Pictures/1000000000000708000003F571433686.jpg" manifest:media-type="image/jpeg"/>
  <manifest:file-entry manifest:full-path="Pictures/100000000000084100000580EE3D443A.jpg" manifest:media-type="image/jpeg"/>
  <manifest:file-entry manifest:full-path="Pictures/10000000000002BC000001D03B28EA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81c2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ffffff" draw:fill-image-name="Bitmap_20_4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ffffff" draw:fill-image-name="Bitmap_20_5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opacity="50%" draw:textarea-horizontal-align="center" draw:textarea-vertical-align="middle" loext:glow-radius="0cm" draw:color-mode="standard" draw:luminance="0%" draw:contrast="0%" draw:gamma="100%" draw:red="0%" draw:green="0%" draw:blue="0%" fo:clip="rect(0cm, 0cm, 0cm, 0cm)" draw:image-opacity="27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26cm" svg:stroke-color="#009688" svg:stroke-linecap="butt" draw:fill="solid" draw:fill-color="#00968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cm, 2.285cm, 0cm)" draw:image-opacity="100%" style:mirror="none" loext:decorative="false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333333" draw:opacity="40%" draw:textarea-horizontal-align="justify" draw:textarea-vertical-align="middle" draw:auto-grow-height="false" fo:min-height="5.48cm" fo:min-width="29.995cm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333333" draw:opacity="81%" draw:textarea-horizontal-align="justify" draw:textarea-vertical-align="middle" draw:auto-grow-height="false" fo:min-height="7.199cm" fo:min-width="29.809cm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333333" draw:opacity="85%" draw:textarea-horizontal-align="justify" draw:textarea-vertical-align="middle" draw:auto-grow-height="false" fo:min-height="7.199cm" fo:min-width="29.809cm" loext:decorative="false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8.918cm" fo:min-width="29.623cm" loext:decorative="false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333333" draw:opacity="40%" draw:textarea-horizontal-align="justify" draw:textarea-vertical-align="middle" draw:auto-grow-height="false" fo:min-height="7.772cm" fo:min-width="29.747cm" loext:decorative="false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7.772cm" fo:min-width="29.747cm" loext:decorative="false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5.48cm" fo:min-width="29.995cm" loext:decorative="false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.35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1.41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9688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solid" draw:fill-color="#333333" draw:opacity="40%"/>
      <style:paragraph-properties fo:text-align="center"/>
    </style:style>
    <style:style style:name="P12" style:family="paragraph">
      <loext:graphic-properties draw:fill="solid" draw:fill-color="#333333" draw:opacity="81%"/>
      <style:paragraph-properties fo:text-align="center"/>
    </style:style>
    <style:style style:name="P13" style:family="paragraph"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color="#ffffff" loext:opacity="100%" fo:font-size="18pt" fo:hyphenate="false"/>
    </style:style>
    <style:style style:name="P14" style:family="paragraph">
      <loext:graphic-properties draw:fill="none"/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 style:font-independent-line-spacing="true">
        <style:tab-stops/>
      </style:paragraph-properties>
      <style:text-properties fo:color="#ffffff" loext:opacity="100%" fo:font-size="18pt" fo:hyphenate="false"/>
    </style:style>
    <style:style style:name="P15" style:family="paragraph">
      <loext:graphic-properties draw:fill="solid" draw:fill-color="#333333" draw:opacity="85%"/>
      <style:paragraph-properties fo:text-align="center"/>
    </style:style>
    <style:style style:name="P16" style:family="paragraph">
      <loext:graphic-properties draw:fill="solid" draw:fill-color="#333333" draw:opacity="70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color="#b2b2b2" loext:opacity="100%"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writing-mode="lr-tb" style:font-independent-line-spacing="true">
        <style:tab-stops/>
      </style:paragraph-properties>
      <style:text-properties fo:color="#b2b2b2" loext:opacity="100%"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009688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b4b4b4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121e31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323232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121e31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323232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style-name="gr1" draw:text-style-name="P1" draw:layer="layout" svg:width="33.865cm" svg:height="16.879cm" svg:x="0cm" svg:y="0.901cm">
          <draw:image xlink:href="Pictures/100000010000078C000003C35DD1196E.png" xlink:type="simple" xlink:show="embed" xlink:actuate="onLoad" draw:mime-type="image/png">
            <text:p/>
          </draw:image>
        </draw:frame>
        <draw:custom-shape draw:name="TextBox 1" draw:style-name="gr2" draw:text-style-name="P5" draw:layer="layout" svg:width="28.785cm" svg:height="7.009cm" svg:x="2.54cm" svg:y="5.08cm">
          <text:p text:style-name="P2"><text:span text:style-name="T1">Dvostrano napajani asinhroni generator (DFIG)</text:span></text:p>
          <text:p text:style-name="P3"><text:span text:style-name="T2">Dinamičko DAE modeliranje, analiza i plugin pretvarač za dTwin</text:span></text:p>
          <text:p text:style-name="P4"><text:span text:style-name="T3"><text:s/>| <text:s/>Prezentacija projekta (5-6 minuta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4" draw:text-style-name="P5" draw:layer="layout" svg:width="29.209cm" svg:height="1.606cm" svg:x="2.032cm" svg:y="0cm">
          <text:p text:style-name="P2"><text:span text:style-name="T4">Šta je to DFIG vjetroturbina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2.0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7.677cm" svg:height="10.777cm" svg:x="3.175cm" svg:y="8.273cm">
          <draw:image xlink:href="Pictures/1000000000000500000002D062454F77.png" xlink:type="simple" xlink:show="embed" xlink:actuate="onLoad" draw:mime-type="image/png">
            <text:p/>
          </draw:image>
        </draw:frame>
        <draw:custom-shape draw:name="TextBox 3" draw:style-name="gr7" draw:text-style-name="P10" draw:layer="layout" svg:width="29.801cm" svg:height="6.092cm" svg:x="2.032cm" svg:y="2.667cm">
          <text:p text:style-name="P9"><text:span text:style-name="T5">• <text:s/>Stator direktno spojen na mrežu: Radi na konstantnoj frekvenciji trofazne mreže.</text:span></text:p>
          <text:p text:style-name="P9"><text:span text:style-name="T5">• <text:s/>Rotor spojen preko back-to-back pretvarača: Sastoji se od RSC (rotor) i GSC (mreža) pretvarača.</text:span></text:p>
          <text:p text:style-name="P9"><text:span text:style-name="T5">• <text:s/>Kontrola snage klizanja: Pretvarač dimenzionisan samo za snagu klizanja (25-30% nominalne snage), što znatno smanjuje ukupne troškove opreme.</text:span></text:p>
          <text:p text:style-name="P9"><text:span text:style-name="T5">• <text:s/>Razdvojena (dekuplovana) regulacija snage: Vektorskom kontrolom se nezavisno upravlja aktivnom (P_h) i reaktivnom (Q_h) snagom stator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1" draw:layer="layout" svg:width="31.115cm" svg:height="6.35cm" svg:x="1.2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1" draw:style-name="gr9" draw:text-style-name="P5" draw:layer="layout" svg:width="29.209cm" svg:height="1.606cm" svg:x="2.032cm" svg:y="1.27cm">
          <text:p text:style-name="P2"><text:span text:style-name="T4">Matematički model: Milanov dq-DAE mod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31.115cm" svg:height="8.255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11" draw:text-style-name="P14" draw:layer="layout" svg:width="29.801cm" svg:height="7.7cm" svg:x="2.032cm" svg:y="4.572cm">
          <text:p text:style-name="P13"><text:span text:style-name="T6">• <text:s/>Tri dinamičke varijable stanja (ODE):</text:span></text:p>
          <text:p text:style-name="P13"><text:span text:style-name="T6"><text:s text:c="4"/>- <text:s/>Brzina rotora (w_m): Dinamika ravnoteže mehaničkog i elektromagnetnog momenta.</text:span></text:p>
          <text:p text:style-name="P13"><text:span text:style-name="T6"><text:s text:c="4"/>- <text:s/>Rotorske struje (i_rq, i_rd): Vremenska kašnjenja prvog reda koja modeliraju RSC kontroler.</text:span></text:p>
          <text:p text:style-name="P13"><text:span text:style-name="T6">• <text:s/>Elektromagnetni moment (T_e): Algebarski povezuje rotorsku struju i_rq i napon sabirnice v_h.</text:span></text:p>
          <text:p text:style-name="P13"><text:span text:style-name="T6">• <text:s/>Ubrizgavanje snage u mrežu: Računanje aktivne snage P_h i reaktivne snage Q_h na sabirnici generatora.</text:span></text:p>
          <text:p text:style-name="P13"><text:span text:style-name="T6">• <text:s/>Kompatibilnost sa rješavačem: Jednačine unesene direktno u ODE blokove radi stabilnijeg rad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>
        <draw:custom-shape draw:name="TextBox 1" draw:style-name="gr12" draw:text-style-name="P5" draw:layer="layout" svg:width="29.209cm" svg:height="1.606cm" svg:x="2.032cm" svg:y="1.27cm">
          <text:p text:style-name="P2"><text:span text:style-name="T4">Arhitektura programa i ModelConver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5" draw:layer="layout" svg:width="31.115cm" svg:height="8.255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14" draw:text-style-name="P14" draw:layer="layout" svg:width="29.801cm" svg:height="8.039cm" svg:x="2.032cm" svg:y="4.572cm">
          <text:p text:style-name="P13"><text:span text:style-name="T6">• <text:s/>Faze 1-3: Parsiranje XML-a i izgradnja matrica (rijetka Y-bus matrica admitansi, guste matrice napona i parametara).</text:span></text:p>
          <text:p text:style-name="P13"><text:span text:style-name="T6">• <text:s/>Faze 4-5: Zapisivanje konfiguracionog zaglavlja DMODL-a i deklaracija početnih stanja varijabli.</text:span></text:p>
          <text:p text:style-name="P13"><text:span text:style-name="T6">• <text:s/>Faza 6: Sekcija parametara s konstantama i registracija algebarskih izlaza kao [out=true].</text:span></text:p>
          <text:p text:style-name="P13"><text:span text:style-name="T6">• <text:s/>Faze 7-10: Generisanje ODE jednačina, postprocesiranja i kreiranje izlaznih datoteka (.dmodl i .vmodl).</text:span></text:p>
          <text:p text:style-name="P13"><text:span text:style-name="T6">• <text:s/>Memorijska stabilnost: Pisanje putem lokalnih bafera sprečava curenje memorije i rušenje dTwin-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">
        <draw:custom-shape draw:name="TextBox 1" draw:style-name="gr15" draw:text-style-name="P5" draw:layer="layout" svg:width="29.209cm" svg:height="1.606cm" svg:x="2.032cm" svg:y="1.27cm">
          <text:p text:style-name="P2"><text:span text:style-name="T4">Simulacija i analiza: IEEE 9-sabirnički sist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6" draw:layer="layout" svg:width="31.115cm" svg:height="10.16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17" draw:text-style-name="P14" draw:layer="layout" svg:width="29.801cm" svg:height="9.563cm" svg:x="2.032cm" svg:y="4.572cm">
          <text:p text:style-name="P13"><text:span text:style-name="T6">• <text:s/>Aktivna snaga (P_h): Brzo se stabilizuje na vrijednosti od oko 1.63 p.u. (163 MW na bazi 100 MVA).</text:span></text:p>
          <text:p text:style-name="P13"><text:span text:style-name="T6">• <text:s/>Reaktivna snaga (Q_h): Reguliše se na stabilnih -0.12 p.u. radi pružanja naponske podrške sabirnici.</text:span></text:p>
          <text:p text:style-name="P13"><text:span text:style-name="T6">• <text:s/>Dinamika rotora: Brzina rotora (w_m) glatko ubrzava sa 1.0 p.u. i ustaljuje se na optimalnih 1.2 p.u.</text:span></text:p>
          <text:p text:style-name="P13"><text:span text:style-name="T6">• <text:s/>Upravljanje strujama: Rotorske struje (i_rq i i_rd) stabilno prate reference pretvarača na strani rotora.</text:span></text:p>
          <text:p text:style-name="P13"><text:span text:style-name="T6">• <text:s/>Stabilnost sinhronih mašina: Oscilacije uglova i brzina preostala dva generatora prigušuju se za manje od 4 sekund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ank">
        <draw:custom-shape draw:name="TextBox 1" draw:style-name="gr18" draw:text-style-name="P18" draw:layer="layout" svg:width="29.209cm" svg:height="1.606cm" svg:x="2.032cm" svg:y="1.27cm">
          <text:p text:style-name="P17"><text:span text:style-name="T7">Simulacija i analiza: IEEE 118-sabirnički sist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1" draw:layer="layout" svg:width="31.115cm" svg:height="8.89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20" draw:text-style-name="P14" draw:layer="layout" svg:width="29.801cm" svg:height="8.039cm" svg:x="2.032cm" svg:y="4.572cm">
          <text:p text:style-name="P13"><text:span text:style-name="T6">• <text:s/>Skalabilnost u velikoj mreži: Uspješno simuliran rad DFIG-a u sistemu sa ukupno 54 generatora.</text:span></text:p>
          <text:p text:style-name="P13"><text:span text:style-name="T6">• <text:s/>Stabilnost DFIG-a: Lokalne regulacijske petlje vjetroturbine rade stabilno bez uticaja drugih mašina.</text:span></text:p>
          <text:p text:style-name="P13"><text:span text:style-name="T6">• <text:s/>Sinhronizam generatora: Preostala 53 sinhrona generatora ostaju u stabilnom radu nakon uključenja DFIG-a.</text:span></text:p>
          <text:p text:style-name="P13"><text:span text:style-name="T6">• <text:s/>Damping oscilacija: Brzine rotora sinhronih mašina se brzo prigušuju, potvrđujući da DFIG ne unosi nestabilnost.</text:span></text:p>
          <text:p text:style-name="P13"><text:span text:style-name="T6">• <text:s/>Robusnost: Dokazan stabilan rad algoritma u velikim prenosnim mrežam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lank">
        <draw:frame draw:style-name="gr21" draw:text-style-name="P8" draw:layer="layout" svg:width="33.865cm" svg:height="15.51cm" svg:x="0.001cm" svg:y="1cm">
          <draw:image xlink:href="Pictures/10000001000011F80000083B4EB3189C.png" xlink:type="simple" xlink:show="embed" xlink:actuate="onLoad" draw:mime-type="image/png">
            <text:p/>
          </draw:image>
        </draw:frame>
        <draw:custom-shape draw:name="TextBox 1" draw:style-name="gr22" draw:text-style-name="P5" draw:layer="layout" svg:width="29.209cm" svg:height="1.606cm" svg:x="2.032cm" svg:y="1.27cm">
          <text:p text:style-name="P2"><text:span text:style-name="T4">Kompajliranje i instalacij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6" draw:layer="layout" svg:width="31.115cm" svg:height="8.89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24" draw:text-style-name="P14" draw:layer="layout" svg:width="29.801cm" svg:height="7.7cm" svg:x="2.032cm" svg:y="4.572cm">
          <text:p text:style-name="P13"><text:span text:style-name="T6">• <text:s/>Linux (GCC / Makefile):</text:span></text:p>
          <text:p text:style-name="P13"><text:span text:style-name="T6"><text:s text:c="4"/>- <text:s/>cmake -DCMAKE_BUILD_TYPE=Release .. &amp;&amp; cmake --build . -j$(nproc)</text:span></text:p>
          <text:p text:style-name="P13"><text:span text:style-name="T6">• <text:s/>Windows (Visual Studio / MSBuild):</text:span></text:p>
          <text:p text:style-name="P13"><text:span text:style-name="T6"><text:s text:c="4"/>- <text:s/>cmake .. &amp;&amp; cmake --build . --config Release</text:span></text:p>
          <text:p text:style-name="P13"><text:span text:style-name="T6">• <text:s/>Instalacija: Kopiranje dll/so biblioteke u 'plugins' direktorijum dTwin aplikacije.</text:span></text:p>
          <text:p text:style-name="P13"><text:span text:style-name="T6">• <text:s/>Verifikacija: test_runner vrši automatsku konverziju i testiranje rješavača na 9, 30, 118 i 300 sabirnic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Blank">
        <draw:custom-shape draw:name="TextBox 1" draw:style-name="gr25" draw:text-style-name="P5" draw:layer="layout" svg:width="29.209cm" svg:height="1.606cm" svg:x="2.032cm" svg:y="1.27cm">
          <text:p text:style-name="P2"><text:span text:style-name="T4">Zaključa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6" draw:layer="layout" svg:width="31.115cm" svg:height="6.35cm" svg:x="1.2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27" draw:text-style-name="P14" draw:layer="layout" svg:width="29.801cm" svg:height="4.568cm" svg:x="2.032cm" svg:y="4.572cm">
          <text:p text:style-name="P13"><text:span text:style-name="T6">• <text:s/>Uspješna integracija: Milanov DFIG model u potpunosti integrisan u dTwin platformu.</text:span></text:p>
          <text:p text:style-name="P13"><text:span text:style-name="T6">• <text:s/>Stabilan rad: Plugin radi bez rušenja na Windows i Linux operativnim sistemima.</text:span></text:p>
          <text:p text:style-name="P13"><text:span text:style-name="T6">• <text:s/>Skalabilnost: Testirano i potvrđeno na mrežama do 300 sabirnica (IEEE 300).</text:span></text:p>
          <text:p text:style-name="P13"><text:span text:style-name="T6">• <text:s/>Visoka numerička stabilnost: Riješeni svi padovi memorije i debalansi jednačina u rješavaču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2BC000001D03B28EA29.jpg" xlink:type="simple" xlink:show="embed" xlink:actuate="onLoad"/>
    <draw:fill-image draw:name="Bitmap_20_3" draw:display-name="Bitmap 3" xlink:href="Pictures/100000000000084100000580EE3D443A.jpg" xlink:type="simple" xlink:show="embed" xlink:actuate="onLoad"/>
    <draw:fill-image draw:name="Bitmap_20_4" draw:display-name="Bitmap 4" xlink:href="Pictures/1000000000000708000003F571433686.jpg" xlink:type="simple" xlink:show="embed" xlink:actuate="onLoad"/>
    <draw:fill-image draw:name="Bitmap_20_5" draw:display-name="Bitmap 5" xlink:href="Pictures/1000000000000280000001AA8C8631F1.jpg" xlink:type="simple" xlink:show="embed" xlink:actuate="onLoad"/>
    <draw:fill-image draw:name="background" xlink:href="Pictures/10000000000004FF0000035937DA97E2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ffset-x="0.203cm" draw:shadow-offset-y="0.203cm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2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3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24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6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 fo:margin-left="0cm" fo:margin-right="0cm" fo:margin-top="0.09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0" style:family="paragraph">
      <style:paragraph-properties fo:text-align="lef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size="3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-0.953cm"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Slide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6.253cm" svg:x="1.27cm" svg:y="0.763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3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7" draw:text-style-name="MP17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9">Click to edit Master title style</text:span></text:p>
        </draw:text-box>
      </draw:frame>
      <draw:frame draw:name="Text Placeholder 2" presentation:style-name="Mpr22" draw:text-style-name="MP21" draw:layer="backgroundobjects" svg:width="21.589cm" svg:height="4.166cm" svg:x="2.006cm" svg:y="8.074cm" presentation:class="outline" presentation:user-transformed="true">
        <draw:text-box>
          <text:list text:style-name="ML5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Date Placeholder 3" presentation:style-name="Mpr2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23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2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7" draw:text-style-name="MP23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22"><text:span text:style-name="MT11">Fourth level</text:span></text:p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3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14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2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2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25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2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25" draw:layer="backgroundobjects" svg:width="11.222cm" svg:height="10.975cm" svg:x="1.27cm" svg:y="6.04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5" draw:layer="backgroundobjects" svg:width="11.226cm" svg:height="1.776cm" svg:x="12.903cm" svg:y="4.264cm" presentation:class="outline" presentation:user-transformed="true">
        <draw:text-box>
          <text:p text:style-name="MP24"><text:span text:style-name="MT12">Click to edit Master text styles</text:span></text:p>
        </draw:text-box>
      </draw:frame>
      <draw:frame draw:name="Content Placeholder 5" presentation:style-name="Mpr33" draw:text-style-name="MP25" draw:layer="backgroundobjects" svg:width="11.226cm" svg:height="10.975cm" svg:x="12.903cm" svg:y="6.04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7" presentation:style-name="Mpr34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8" presentation:style-name="Mpr34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3" presentation:style-name="Mpr3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4" presentation:style-name="Mpr3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Only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2" presentation:style-name="Mpr41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3" presentation:style-name="Mpr41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3.227cm" svg:x="1.27cm" svg:y="0.758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Content Placeholder 2" presentation:style-name="Mpr45" draw:text-style-name="MP17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9" draw:layer="backgroundobjects" svg:width="8.355cm" svg:height="13.03cm" svg:x="1.27cm" svg:y="3.986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4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46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46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573cm" svg:x="4.979cm" svg:y="13.335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Picture Placeholder 2" presentation:style-name="Mpr50" draw:text-style-name="MP17" draw:layer="backgroundobjects" svg:width="15.239cm" svg:height="11.429cm" svg:x="4.979cm" svg:y="1.702cm" presentation:class="outline" presentation:user-transformed="true">
        <draw:text-box>
          <text:list text:style-name="ML5">
            <text:list-item>
              <text:p text:style-name="MP30"><text:span text:style-name="MT16">Click to edit the outline text format</text:span></text:p>
              <text:list>
                <text:list-item>
                  <text:p text:style-name="MP30"><text:span text:style-name="MT16">Second Outline Level</text:span></text:p>
                  <text:list>
                    <text:list-item>
                      <text:p text:style-name="MP30"><text:span text:style-name="MT16">Third Outline Level</text:span></text:p>
                      <text:list>
                        <text:list-item>
                          <text:p text:style-name="MP30"><text:span text:style-name="MT16">Fourth Outline Level</text:span></text:p>
                          <text:list>
                            <text:list-item>
                              <text:p text:style-name="MP30"><text:span text:style-name="MT16">Fifth Outline Level</text:span></text:p>
                              <text:list>
                                <text:list-item>
                                  <text:p text:style-name="MP30"><text:span text:style-name="MT16">Sixth Outline Level</text:span></text:p>
                                  <text:list>
                                    <text:list-item>
                                      <text:p text:style-name="MP30"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29" draw:layer="backgroundobjects" svg:width="15.239cm" svg:height="2.235cm" svg:x="4.979cm" svg:y="14.909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5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52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52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3</meta:editing-cycles>
    <meta:creation-date>2013-01-27T09:14:16</meta:creation-date>
    <dc:date>2026-07-06T21:49:17.026529379</dc:date>
    <meta:editing-duration>PT23M47S</meta:editing-duration>
    <meta:generator>LibreOffice/26.2.4.2$Linux_X86_64 LibreOffice_project/df4f15f06f7b375c1d16aa35fba92d50b262cd01</meta:generator>
    <meta:document-statistic meta:object-count="186"/>
    <meta:user-defined meta:name="AppVersion">14.0000</meta:user-defined>
    <meta:user-defined meta:name="PresentationFormat">On-screen Show (4:3)</meta:user-defined>
  </office:meta>
</office:document-meta>
</file>